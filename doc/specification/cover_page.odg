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42pt" fo:font-weight="350" style:font-size-asian="42pt" style:font-weight-asian="350" style:font-name-complex="Roboto1" style:font-size-complex="42pt" style:font-weight-complex="350"/>
    </style:style>
    <style:style style:name="T2" style:family="text">
      <style:text-properties fo:color="#000000" loext:opacity="100%" style:font-name="Roboto1" fo:font-size="48pt" fo:font-weight="350" style:font-size-asian="48pt" style:font-weight-asian="350" style:font-name-complex="Roboto1" style:font-size-complex="48pt" style:font-weight-complex="350"/>
    </style:style>
    <style:style style:name="T3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4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5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Rules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4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4">Rulew for CMTAT tokens and RuleEngine</text:span></text:p>
            <text:p text:style-name="P2"><text:span text:style-name="T4">on Ethereum and EVM compatible blockchains.</text:span><text:span text:style-name="T4"><text:line-break/></text:span><text:span text:style-name="T4"/></text:p>
          </draw:text-box>
        </draw:frame>
        <draw:frame draw:style-name="gr8" draw:text-style-name="P7" draw:layer="layout" svg:width="7.012cm" svg:height="1.588cm" svg:x="2.35cm" svg:y="10.449cm">
          <draw:text-box>
            <text:p text:style-name="P2"><text:span text:style-name="T5">Rules version: </text:span><text:span text:style-name="T5"><text:line-break/></text:span><text:span text:style-name="T5">First published: Märch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3-05T18:30:42.646748566</dc:date>
    <meta:editing-duration>PT5M40S</meta:editing-duration>
    <meta:editing-cycles>7</meta:editing-cycles>
    <meta:generator>LibreOffice/7.3.7.2$Linux_X86_64 LibreOffice_project/30$Build-2</meta:generator>
    <meta:document-statistic meta:object-count="2562"/>
  </office:meta>
</office:document-meta>
</file>